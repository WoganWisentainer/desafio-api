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92311" officeooo:paragraph-rsid="00092311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92311" officeooo:paragraph-rsid="00092311"/>
    </style:style>
    <style:style style:name="P3" style:family="paragraph" style:parent-style-name="Standard">
      <style:text-properties officeooo:paragraph-rsid="00092c58"/>
    </style:style>
    <style:style style:name="P4" style:family="paragraph" style:parent-style-name="Standard">
      <style:text-properties officeooo:paragraph-rsid="00092311"/>
    </style:style>
    <style:style style:name="P5" style:family="paragraph" style:parent-style-name="Standard">
      <style:text-properties officeooo:rsid="00094cbf" officeooo:paragraph-rsid="00094cbf"/>
    </style:style>
    <style:style style:name="P6" style:family="paragraph" style:parent-style-name="Standard">
      <style:text-properties officeooo:paragraph-rsid="00094cbf"/>
    </style:style>
    <style:style style:name="T1" style:family="text">
      <style:text-properties officeooo:rsid="00092311"/>
    </style:style>
    <style:style style:name="T2" style:family="text">
      <style:text-properties officeooo:rsid="00092c5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9c0f1"/>
    </style:style>
    <style:style style:name="T5" style:family="text">
      <style:text-properties officeooo:rsid="00094c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</text:p>
      <text:p text:style-name="P2"/>
      <text:p text:style-name="P3"><text:span text:style-name="T1">A API Rest foi feita usando-se Python 3 (versão 3.14) usando </text:span>FastAPI. <text:span text:style-name="T2">Também foram usadas as bibliotecas </text:span><text:span text:style-name="Strong_20_Emphasis"><text:span text:style-name="T3">Uvicorn</text:span></text:span><text:span text:style-name="T3"> e </text:span><text:span text:style-name="Strong_20_Emphasis"><text:span text:style-name="T3">Requests</text:span></text:span><text:span text:style-name="T3">.</text:span> <text:span text:style-name="T2">Ademais, o ChatGP</text:span><text:span text:style-name="T4">T</text:span><text:span text:style-name="T2"> foi utilizado para fazer a atividade. </text:span></text:p>
      <text:p text:style-name="P4"/>
      <text:p text:style-name="P4"><text:span text:style-name="T1">No caso e</text:span>la<text:span text:style-name="T1"> faz uma consulta sobre o link disponib</text:span><text:span text:style-name="T5">i</text:span><text:span text:style-name="T1">lizado no desafio e vai retornar os dados juntamente da data usada. </text:span><text:span text:style-name="T5">A data usada deve ser no formato Ano-mês-dia.</text:span></text:p>
      <text:p text:style-name="P4"/>
      <text:p text:style-name="P5">Passos:</text:p>
      <text:p text:style-name="P5">1 – Baixar o arquivo do GitHub.</text:p>
      <text:p text:style-name="P6"><text:span text:style-name="T5">2 – Abrir o terminal CMD. <text:s/>Abrir onde a pasta estiver. </text:span><text:span text:style-name="T2">Para instalar as três bibliotecas (FastAPI, Uvicorn e Requests), </text:span><text:span text:style-name="T5">deve</text:span><text:span text:style-name="T2"> ser utilizado o comando “</text:span>pip install -r requirements.txt” <text:span text:style-name="T2">no terminal. </text:span></text:p>
      <text:p text:style-name="P6"><text:span text:style-name="T5">3 – Após a instalação das bibliotecas,</text:span><text:span text:style-name="T2"> executa</text:span><text:span text:style-name="T5">r</text:span><text:span text:style-name="T2"> com o comando “</text:span>uvicorn main:app –reload”. <text:span text:style-name="T2">Se tudo der certo, a API vai estar em “</text:span><text:a xlink:type="simple" xlink:href="http://127.0.0.1:8000/" text:style-name="Internet_20_link" text:visited-style-name="Visited_20_Internet_20_Link">http://127.0.0.1:8000</text:a>” <text:span text:style-name="T2">e</text:span> <text:span text:style-name="T5">a </text:span>documentação <text:span text:style-name="T2">vai estar</text:span> em “<text:a xlink:type="simple" xlink:href="http://127.0.0.1:8000/docs" text:style-name="Internet_20_link" text:visited-style-name="Visited_20_Internet_20_Link">http://127.0.0.1:8000/docs</text:a>”.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1T18:20:53.417047600</meta:creation-date>
    <dc:date>2026-05-31T19:01:52.419515800</dc:date>
    <meta:editing-duration>PT7M2S</meta:editing-duration>
    <meta:editing-cycles>1</meta:editing-cycles>
    <meta:document-statistic meta:table-count="0" meta:image-count="0" meta:object-count="0" meta:page-count="1" meta:paragraph-count="7" meta:word-count="126" meta:character-count="794" meta:non-whitespace-character-count="669"/>
    <meta:generator>LibreOffice/25.2.7.2$Windows_X86_64 LibreOffice_project/5cbfd1ab6520636bb5f7b99185aa69bd7456825d</meta:generator>
  </office:meta>
</office:document-meta>
</file>